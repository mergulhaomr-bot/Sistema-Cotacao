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Default" style:master-page-name="MP0" style:family="paragraph">
      <style:paragraph-properties fo:break-before="page"/>
      <style:text-properties fo:font-weight="bold" style:font-weight-asian="bold" fo:font-size="10pt" style:font-size-asian="10pt"/>
    </style:style>
    <style:style style:name="P16" style:parent-style-name="Default" style:family="paragraph">
      <style:text-properties fo:font-weight="bold" style:font-weight-asian="bold" fo:font-size="10pt" style:font-size-asian="10pt"/>
    </style:style>
    <style:style style:name="P17" style:parent-style-name="Default" style:family="paragraph">
      <style:text-properties fo:font-weight="bold" style:font-weight-asian="bold" fo:font-size="10pt" style:font-size-asian="10pt"/>
    </style:style>
    <style:style style:name="P18" style:parent-style-name="Default" style:family="paragraph">
      <style:text-properties fo:font-weight="bold" style:font-weight-asian="bold" fo:font-size="10pt" style:font-size-asian="10pt"/>
    </style:style>
    <style:style style:name="P19" style:parent-style-name="Default" style:family="paragraph">
      <style:text-properties fo:font-weight="bold" style:font-weight-asian="bold" fo:font-size="10pt" style:font-size-asian="10pt"/>
    </style:style>
    <style:style style:name="P20" style:parent-style-name="Default" style:family="paragraph">
      <style:text-properties fo:font-weight="bold" style:font-weight-asian="bold" fo:font-size="10pt" style:font-size-asian="10pt"/>
    </style:style>
    <style:style style:name="P21" style:parent-style-name="Default" style:family="paragraph">
      <style:text-properties fo:font-weight="bold" style:font-weight-asian="bold" fo:font-size="10pt" style:font-size-asian="10pt"/>
    </style:style>
    <style:style style:name="P22" style:parent-style-name="Default" style:family="paragraph">
      <style:text-properties fo:font-weight="bold" style:font-weight-asian="bold" fo:font-size="10pt" style:font-size-asian="10pt"/>
    </style:style>
    <style:style style:name="P23" style:parent-style-name="Default" style:family="paragraph">
      <style:text-properties fo:font-weight="bold" style:font-weight-asian="bold" fo:font-size="10pt" style:font-size-asian="10pt"/>
    </style:style>
    <style:style style:name="P24" style:parent-style-name="Default" style:family="paragraph">
      <style:text-properties fo:font-weight="bold" style:font-weight-asian="bold" fo:font-size="10pt" style:font-size-asian="10pt"/>
    </style:style>
    <style:style style:name="P25" style:parent-style-name="Default" style:family="paragraph">
      <style:text-properties fo:font-weight="bold" style:font-weight-asian="bold" fo:font-size="10pt" style:font-size-asian="10pt"/>
    </style:style>
    <style:style style:name="TableColumn27" style:family="table-column">
      <style:table-column-properties style:column-width="0.868in" style:use-optimal-column-width="false"/>
    </style:style>
    <style:style style:name="TableColumn28" style:family="table-column">
      <style:table-column-properties style:column-width="3.1055in" style:use-optimal-column-width="false"/>
    </style:style>
    <style:style style:name="TableColumn29" style:family="table-column">
      <style:table-column-properties style:column-width="0.7138in" style:use-optimal-column-width="false"/>
    </style:style>
    <style:style style:name="TableColumn30" style:family="table-column">
      <style:table-column-properties style:column-width="0.5111in" style:use-optimal-column-width="false"/>
    </style:style>
    <style:style style:name="TableColumn31" style:family="table-column">
      <style:table-column-properties style:column-width="0.5111in" style:use-optimal-column-width="false"/>
    </style:style>
    <style:style style:name="TableColumn32" style:family="table-column">
      <style:table-column-properties style:column-width="0.6659in" style:use-optimal-column-width="false"/>
    </style:style>
    <style:style style:name="Table26" style:family="table">
      <style:table-properties style:width="6.3756in" fo:margin-left="-0.0354in" table:align="left"/>
    </style:style>
    <style:style style:name="TableRow33" style:family="table-row">
      <style:table-row-properties style:min-row-height="0.0756in" style:use-optimal-row-height="false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" style:parent-style-name="Default" style:family="paragraph">
      <style:text-properties style:font-size-complex="12pt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" style:parent-style-name="Default" style:family="paragraph">
      <style:text-properties style:font-size-complex="12pt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" style:parent-style-name="Default" style:family="paragraph">
      <style:text-properties style:font-size-complex="12pt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" style:parent-style-name="Default" style:family="paragraph">
      <style:text-properties style:font-size-complex="12pt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" style:parent-style-name="Default" style:family="paragraph">
      <style:text-properties style:font-size-complex="12pt"/>
    </style:style>
    <style:style style:name="TableCell44" style:family="table-cell">
      <style:table-cell-properties fo:border="0.0034in solid #000000" style:writing-mode="lr-tb" fo:padding-top="0in" fo:padding-left="0.075in" fo:padding-bottom="0in" fo:padding-right="0.075in"/>
    </style:style>
    <style:style style:name="P45" style:parent-style-name="Default" style:family="paragraph">
      <style:text-properties style:font-size-complex="12pt"/>
    </style:style>
    <style:style style:name="TableRow46" style:family="table-row">
      <style:table-row-properties style:min-row-height="0.0756in"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" style:parent-style-name="Default" style:family="paragraph">
      <style:text-properties style:font-size-complex="12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" style:parent-style-name="Default" style:family="paragraph">
      <style:text-properties style:font-size-complex="12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2" style:parent-style-name="Default" style:family="paragraph">
      <style:text-properties style:font-size-complex="12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" style:parent-style-name="Default" style:family="paragraph">
      <style:text-properties style:font-size-complex="12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" style:parent-style-name="Default" style:family="paragraph">
      <style:text-properties style:font-size-complex="12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8" style:parent-style-name="Default" style:family="paragraph">
      <style:text-properties style:font-size-complex="12pt"/>
    </style:style>
    <style:style style:name="TableRow59" style:family="table-row">
      <style:table-row-properties style:min-row-height="0.0756in"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" style:parent-style-name="Default" style:family="paragraph">
      <style:text-properties style:font-size-complex="12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" style:parent-style-name="Default" style:family="paragraph">
      <style:text-properties style:font-size-complex="12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" style:parent-style-name="Default" style:family="paragraph">
      <style:text-properties style:font-size-complex="12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7" style:parent-style-name="Default" style:family="paragraph">
      <style:text-properties style:font-size-complex="12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9" style:parent-style-name="Default" style:family="paragraph">
      <style:text-properties style:font-size-complex="12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1" style:parent-style-name="Default" style:family="paragraph">
      <style:text-properties style:font-size-complex="12pt"/>
    </style:style>
    <style:style style:name="TableRow72" style:family="table-row">
      <style:table-row-properties style:min-row-height="0.0756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" style:parent-style-name="Default" style:family="paragraph">
      <style:text-properties style:font-size-complex="12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6" style:parent-style-name="Default" style:family="paragraph">
      <style:text-properties style:font-size-complex="12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" style:parent-style-name="Default" style:family="paragraph">
      <style:text-properties style:font-size-complex="12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" style:parent-style-name="Default" style:family="paragraph">
      <style:text-properties style:font-size-complex="12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" style:parent-style-name="Default" style:family="paragraph">
      <style:text-properties style:font-size-complex="12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4" style:parent-style-name="Default" style:family="paragraph">
      <style:text-properties style:font-size-complex="12pt"/>
    </style:style>
    <style:style style:name="TableRow85" style:family="table-row">
      <style:table-row-properties style:min-row-height="0.0756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" style:parent-style-name="Default" style:family="paragraph">
      <style:text-properties style:font-size-complex="12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9" style:parent-style-name="Default" style:family="paragraph">
      <style:text-properties style:font-size-complex="12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1" style:parent-style-name="Default" style:family="paragraph">
      <style:text-properties style:font-size-complex="12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" style:parent-style-name="Default" style:family="paragraph">
      <style:text-properties style:font-size-complex="12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" style:parent-style-name="Default" style:family="paragraph">
      <style:text-properties style:font-size-complex="12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7" style:parent-style-name="Default" style:family="paragraph">
      <style:text-properties style:font-size-complex="12pt"/>
    </style:style>
    <style:style style:name="TableRow98" style:family="table-row">
      <style:table-row-properties style:min-row-height="0.0756in" style:use-optimal-row-height="false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0" style:parent-style-name="Default" style:family="paragraph">
      <style:text-properties style:font-size-complex="12pt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" style:parent-style-name="Default" style:family="paragraph">
      <style:text-properties style:font-size-complex="12pt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" style:parent-style-name="Default" style:family="paragraph">
      <style:text-properties style:font-size-complex="12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" style:parent-style-name="Default" style:family="paragraph">
      <style:text-properties style:font-size-complex="12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" style:parent-style-name="Default" style:family="paragraph">
      <style:text-properties style:font-size-complex="12pt"/>
    </style:style>
    <style:style style:name="TableCell109" style:family="table-cell">
      <style:table-cell-properties fo:border="0.0034in solid #000000" style:writing-mode="lr-tb" fo:padding-top="0in" fo:padding-left="0.075in" fo:padding-bottom="0in" fo:padding-right="0.075in"/>
    </style:style>
    <style:style style:name="P110" style:parent-style-name="Default" style:family="paragraph">
      <style:text-properties style:font-size-complex="12pt"/>
    </style:style>
    <style:style style:name="TableRow111" style:family="table-row">
      <style:table-row-properties style:min-row-height="0.0756in"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" style:parent-style-name="Default" style:family="paragraph">
      <style:text-properties style:font-size-complex="12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" style:parent-style-name="Default" style:family="paragraph">
      <style:text-properties style:font-size-complex="12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7" style:parent-style-name="Default" style:family="paragraph">
      <style:text-properties style:font-size-complex="12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9" style:parent-style-name="Default" style:family="paragraph">
      <style:text-properties style:font-size-complex="12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1" style:parent-style-name="Default" style:family="paragraph">
      <style:text-properties style:font-size-complex="12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3" style:parent-style-name="Default" style:family="paragraph">
      <style:text-properties style:font-size-complex="12pt"/>
    </style:style>
    <style:style style:name="TableRow124" style:family="table-row">
      <style:table-row-properties style:min-row-height="0.0756in"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6" style:parent-style-name="Default" style:family="paragraph">
      <style:text-properties style:font-size-complex="12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8" style:parent-style-name="Default" style:family="paragraph">
      <style:text-properties style:font-size-complex="12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0" style:parent-style-name="Default" style:family="paragraph">
      <style:text-properties style:font-size-complex="12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2" style:parent-style-name="Default" style:family="paragraph">
      <style:text-properties style:font-size-complex="12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4" style:parent-style-name="Default" style:family="paragraph">
      <style:text-properties style:font-size-complex="12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6" style:parent-style-name="Default" style:family="paragraph">
      <style:text-properties style:font-size-complex="12pt"/>
    </style:style>
    <style:style style:name="TableRow137" style:family="table-row">
      <style:table-row-properties style:min-row-height="0.0756in"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9" style:parent-style-name="Default" style:family="paragraph">
      <style:text-properties style:font-size-complex="12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1" style:parent-style-name="Default" style:family="paragraph">
      <style:text-properties style:font-size-complex="12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3" style:parent-style-name="Default" style:family="paragraph">
      <style:text-properties style:font-size-complex="12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5" style:parent-style-name="Default" style:family="paragraph">
      <style:text-properties style:font-size-complex="12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7" style:parent-style-name="Default" style:family="paragraph">
      <style:text-properties style:font-size-complex="12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9" style:parent-style-name="Default" style:family="paragraph">
      <style:text-properties style:font-size-complex="12pt"/>
    </style:style>
    <style:style style:name="TableRow150" style:family="table-row">
      <style:table-row-properties style:min-row-height="0.0756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2" style:parent-style-name="Default" style:family="paragraph">
      <style:text-properties style:font-size-complex="12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4" style:parent-style-name="Default" style:family="paragraph">
      <style:text-properties style:font-size-complex="12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6" style:parent-style-name="Default" style:family="paragraph">
      <style:text-properties style:font-size-complex="12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8" style:parent-style-name="Default" style:family="paragraph">
      <style:text-properties style:font-size-complex="12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0" style:parent-style-name="Default" style:family="paragraph">
      <style:text-properties style:font-size-complex="12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62" style:parent-style-name="Default" style:family="paragraph">
      <style:text-properties style:font-size-complex="12pt"/>
    </style:style>
    <style:style style:name="TableRow163" style:family="table-row">
      <style:table-row-properties style:min-row-height="0.0756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5" style:parent-style-name="Default" style:family="paragraph">
      <style:text-properties style:font-size-complex="12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7" style:parent-style-name="Default" style:family="paragraph">
      <style:text-properties style:font-size-complex="12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9" style:parent-style-name="Default" style:family="paragraph">
      <style:text-properties style:font-size-complex="12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1" style:parent-style-name="Default" style:family="paragraph">
      <style:text-properties style:font-size-complex="12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3" style:parent-style-name="Default" style:family="paragraph">
      <style:text-properties style:font-size-complex="12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75" style:parent-style-name="Default" style:family="paragraph">
      <style:text-properties style:font-size-complex="12pt"/>
    </style:style>
    <style:style style:name="TableRow176" style:family="table-row">
      <style:table-row-properties style:min-row-height="0.0756in"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8" style:parent-style-name="Default" style:family="paragraph">
      <style:text-properties style:font-size-complex="12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0" style:parent-style-name="Default" style:family="paragraph">
      <style:text-properties style:font-size-complex="12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2" style:parent-style-name="Default" style:family="paragraph">
      <style:text-properties style:font-size-complex="12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4" style:parent-style-name="Default" style:family="paragraph">
      <style:text-properties style:font-size-complex="12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6" style:parent-style-name="Default" style:family="paragraph">
      <style:text-properties style:font-size-complex="12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88" style:parent-style-name="Default" style:family="paragraph">
      <style:text-properties style:font-size-complex="12pt"/>
    </style:style>
    <style:style style:name="TableRow189" style:family="table-row">
      <style:table-row-properties style:min-row-height="0.0756in"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1" style:parent-style-name="Default" style:family="paragraph">
      <style:text-properties style:font-size-complex="12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3" style:parent-style-name="Default" style:family="paragraph">
      <style:text-properties style:font-size-complex="12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5" style:parent-style-name="Default" style:family="paragraph">
      <style:text-properties style:font-size-complex="12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7" style:parent-style-name="Default" style:family="paragraph">
      <style:text-properties style:font-size-complex="12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9" style:parent-style-name="Default" style:family="paragraph">
      <style:text-properties style:font-size-complex="12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01" style:parent-style-name="Default" style:family="paragraph">
      <style:text-properties style:font-size-complex="12pt"/>
    </style:style>
    <style:style style:name="TableRow202" style:family="table-row">
      <style:table-row-properties style:min-row-height="0.0756in"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04" style:parent-style-name="Default" style:family="paragraph">
      <style:text-properties style:font-size-complex="12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06" style:parent-style-name="Default" style:family="paragraph">
      <style:text-properties style:font-size-complex="12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08" style:parent-style-name="Default" style:family="paragraph">
      <style:text-properties style:font-size-complex="12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10" style:parent-style-name="Default" style:family="paragraph">
      <style:text-properties style:font-size-complex="12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12" style:parent-style-name="Default" style:family="paragraph">
      <style:text-properties style:font-size-complex="12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14" style:parent-style-name="Default" style:family="paragraph">
      <style:text-properties style:font-size-complex="12pt"/>
    </style:style>
    <style:style style:name="TableRow215" style:family="table-row">
      <style:table-row-properties style:min-row-height="0.0756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17" style:parent-style-name="Default" style:family="paragraph">
      <style:text-properties style:font-size-complex="12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19" style:parent-style-name="Default" style:family="paragraph">
      <style:text-properties style:font-size-complex="12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21" style:parent-style-name="Default" style:family="paragraph">
      <style:text-properties style:font-size-complex="12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23" style:parent-style-name="Default" style:family="paragraph">
      <style:text-properties style:font-size-complex="12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25" style:parent-style-name="Default" style:family="paragraph">
      <style:text-properties style:font-size-complex="12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27" style:parent-style-name="Default" style:family="paragraph">
      <style:text-properties style:font-size-complex="12pt"/>
    </style:style>
    <style:style style:name="TableRow228" style:family="table-row">
      <style:table-row-properties style:min-row-height="0.0756in"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0" style:parent-style-name="Default" style:family="paragraph">
      <style:text-properties style:font-size-complex="12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2" style:parent-style-name="Default" style:family="paragraph">
      <style:text-properties style:font-size-complex="12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4" style:parent-style-name="Default" style:family="paragraph">
      <style:text-properties style:font-size-complex="12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6" style:parent-style-name="Default" style:family="paragraph">
      <style:text-properties style:font-size-complex="12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8" style:parent-style-name="Default" style:family="paragraph">
      <style:text-properties style:font-size-complex="12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40" style:parent-style-name="Default" style:family="paragraph">
      <style:text-properties style:font-size-complex="12pt"/>
    </style:style>
    <style:style style:name="TableRow241" style:family="table-row">
      <style:table-row-properties style:min-row-height="0.0756in"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43" style:parent-style-name="Default" style:family="paragraph">
      <style:text-properties style:font-size-complex="12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45" style:parent-style-name="Default" style:family="paragraph">
      <style:text-properties style:font-size-complex="12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47" style:parent-style-name="Default" style:family="paragraph">
      <style:text-properties style:font-size-complex="12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49" style:parent-style-name="Default" style:family="paragraph">
      <style:text-properties style:font-size-complex="12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51" style:parent-style-name="Default" style:family="paragraph">
      <style:text-properties style:font-size-complex="12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53" style:parent-style-name="Default" style:family="paragraph">
      <style:text-properties style:font-size-complex="12pt"/>
    </style:style>
    <style:style style:name="TableRow254" style:family="table-row">
      <style:table-row-properties style:min-row-height="0.0756in"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56" style:parent-style-name="Default" style:family="paragraph">
      <style:text-properties style:font-size-complex="12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58" style:parent-style-name="Default" style:family="paragraph">
      <style:text-properties style:font-size-complex="12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60" style:parent-style-name="Default" style:family="paragraph">
      <style:text-properties style:font-size-complex="12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62" style:parent-style-name="Default" style:family="paragraph">
      <style:text-properties style:font-size-complex="12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64" style:parent-style-name="Default" style:family="paragraph">
      <style:text-properties style:font-size-complex="12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66" style:parent-style-name="Default" style:family="paragraph">
      <style:text-properties style:font-size-complex="12pt"/>
    </style:style>
    <style:style style:name="TableRow267" style:family="table-row">
      <style:table-row-properties style:min-row-height="0.0756in"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69" style:parent-style-name="Default" style:family="paragraph">
      <style:text-properties style:font-size-complex="12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1" style:parent-style-name="Default" style:family="paragraph">
      <style:text-properties style:font-size-complex="12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3" style:parent-style-name="Default" style:family="paragraph">
      <style:text-properties style:font-size-complex="12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5" style:parent-style-name="Default" style:family="paragraph">
      <style:text-properties style:font-size-complex="12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7" style:parent-style-name="Default" style:family="paragraph">
      <style:text-properties style:font-size-complex="12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79" style:parent-style-name="Default" style:family="paragraph">
      <style:text-properties style:font-size-complex="12pt"/>
    </style:style>
    <style:style style:name="TableRow280" style:family="table-row">
      <style:table-row-properties style:min-row-height="0.0756in"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2" style:parent-style-name="Default" style:family="paragraph">
      <style:text-properties style:font-size-complex="12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4" style:parent-style-name="Default" style:family="paragraph">
      <style:text-properties style:font-size-complex="12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6" style:parent-style-name="Default" style:family="paragraph">
      <style:text-properties style:font-size-complex="12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8" style:parent-style-name="Default" style:family="paragraph">
      <style:text-properties style:font-size-complex="12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90" style:parent-style-name="Default" style:family="paragraph">
      <style:text-properties style:font-size-complex="12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92" style:parent-style-name="Default" style:family="paragraph">
      <style:text-properties style:font-size-complex="12pt"/>
    </style:style>
    <style:style style:name="TableRow293" style:family="table-row">
      <style:table-row-properties style:min-row-height="0.0756in"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95" style:parent-style-name="Default" style:family="paragraph">
      <style:text-properties style:font-size-complex="12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97" style:parent-style-name="Default" style:family="paragraph">
      <style:text-properties style:font-size-complex="12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99" style:parent-style-name="Default" style:family="paragraph">
      <style:text-properties style:font-size-complex="12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01" style:parent-style-name="Default" style:family="paragraph">
      <style:text-properties style:font-size-complex="12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03" style:parent-style-name="Default" style:family="paragraph">
      <style:text-properties style:font-size-complex="12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05" style:parent-style-name="Default" style:family="paragraph">
      <style:text-properties style:font-size-complex="12pt"/>
    </style:style>
    <style:style style:name="TableRow306" style:family="table-row">
      <style:table-row-properties style:min-row-height="0.0756in"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08" style:parent-style-name="Default" style:family="paragraph">
      <style:text-properties style:font-size-complex="12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0" style:parent-style-name="Default" style:family="paragraph">
      <style:text-properties style:font-size-complex="12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2" style:parent-style-name="Default" style:family="paragraph">
      <style:text-properties style:font-size-complex="12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4" style:parent-style-name="Default" style:family="paragraph">
      <style:text-properties style:font-size-complex="12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6" style:parent-style-name="Default" style:family="paragraph">
      <style:text-properties style:font-size-complex="12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18" style:parent-style-name="Default" style:family="paragraph">
      <style:text-properties style:font-size-complex="12pt"/>
    </style:style>
    <style:style style:name="TableRow319" style:family="table-row">
      <style:table-row-properties style:min-row-height="0.0756in"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1" style:parent-style-name="Default" style:family="paragraph">
      <style:text-properties style:font-size-complex="12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3" style:parent-style-name="Default" style:family="paragraph">
      <style:text-properties style:font-size-complex="12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5" style:parent-style-name="Default" style:family="paragraph">
      <style:text-properties style:font-size-complex="12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7" style:parent-style-name="Default" style:family="paragraph">
      <style:text-properties style:font-size-complex="12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9" style:parent-style-name="Default" style:family="paragraph">
      <style:text-properties style:font-size-complex="12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31" style:parent-style-name="Default" style:family="paragraph">
      <style:text-properties style:font-size-complex="12pt"/>
    </style:style>
    <style:style style:name="TableRow332" style:family="table-row">
      <style:table-row-properties style:min-row-height="0.0756in"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34" style:parent-style-name="Default" style:family="paragraph">
      <style:text-properties style:font-size-complex="12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36" style:parent-style-name="Default" style:family="paragraph">
      <style:text-properties style:font-size-complex="12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38" style:parent-style-name="Default" style:family="paragraph">
      <style:text-properties style:font-size-complex="12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40" style:parent-style-name="Default" style:family="paragraph">
      <style:text-properties style:font-size-complex="12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42" style:parent-style-name="Default" style:family="paragraph">
      <style:text-properties style:font-size-complex="12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44" style:parent-style-name="Default" style:family="paragraph">
      <style:text-properties style:font-size-complex="12pt"/>
    </style:style>
    <style:style style:name="TableRow345" style:family="table-row">
      <style:table-row-properties style:min-row-height="0.0756in"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47" style:parent-style-name="Default" style:family="paragraph">
      <style:text-properties style:font-size-complex="12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49" style:parent-style-name="Default" style:family="paragraph">
      <style:text-properties style:font-size-complex="12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1" style:parent-style-name="Default" style:family="paragraph">
      <style:text-properties style:font-size-complex="12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3" style:parent-style-name="Default" style:family="paragraph">
      <style:text-properties style:font-size-complex="12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5" style:parent-style-name="Default" style:family="paragraph">
      <style:text-properties style:font-size-complex="12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57" style:parent-style-name="Default" style:family="paragraph">
      <style:text-properties style:font-size-complex="12pt"/>
    </style:style>
    <style:style style:name="TableRow358" style:family="table-row">
      <style:table-row-properties style:min-row-height="0.0756in"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0" style:parent-style-name="Default" style:family="paragraph">
      <style:text-properties style:font-size-complex="12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2" style:parent-style-name="Default" style:family="paragraph">
      <style:text-properties style:font-size-complex="12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4" style:parent-style-name="Default" style:family="paragraph">
      <style:text-properties style:font-size-complex="12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6" style:parent-style-name="Default" style:family="paragraph">
      <style:text-properties style:font-size-complex="12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8" style:parent-style-name="Default" style:family="paragraph">
      <style:text-properties style:font-size-complex="12pt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70" style:parent-style-name="Default" style:family="paragraph">
      <style:text-properties style:font-size-complex="12pt"/>
    </style:style>
    <style:style style:name="TableRow371" style:family="table-row">
      <style:table-row-properties style:min-row-height="0.0756in"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3" style:parent-style-name="Default" style:family="paragraph">
      <style:text-properties style:font-size-complex="12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5" style:parent-style-name="Default" style:family="paragraph">
      <style:text-properties style:font-size-complex="12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7" style:parent-style-name="Default" style:family="paragraph">
      <style:text-properties style:font-size-complex="12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9" style:parent-style-name="Default" style:family="paragraph">
      <style:text-properties style:font-size-complex="12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1" style:parent-style-name="Default" style:family="paragraph">
      <style:text-properties style:font-size-complex="12pt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83" style:parent-style-name="Default" style:family="paragraph">
      <style:text-properties style:font-size-complex="12pt"/>
    </style:style>
    <style:style style:name="TableRow384" style:family="table-row">
      <style:table-row-properties style:min-row-height="0.0756in"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6" style:parent-style-name="Default" style:family="paragraph">
      <style:text-properties style:font-size-complex="12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8" style:parent-style-name="Default" style:family="paragraph">
      <style:text-properties style:font-size-complex="12pt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0" style:parent-style-name="Default" style:family="paragraph">
      <style:text-properties style:font-size-complex="12pt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2" style:parent-style-name="Default" style:family="paragraph">
      <style:text-properties style:font-size-complex="12pt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4" style:parent-style-name="Default" style:family="paragraph">
      <style:text-properties style:font-size-complex="12pt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96" style:parent-style-name="Default" style:family="paragraph">
      <style:text-properties style:font-size-complex="12pt"/>
    </style:style>
    <style:style style:name="TableRow397" style:family="table-row">
      <style:table-row-properties style:min-row-height="0.0756in" style:use-optimal-row-height="false"/>
    </style:style>
    <style:style style:name="TableCell39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9" style:parent-style-name="Default" style:family="paragraph">
      <style:text-properties style:font-size-complex="12pt"/>
    </style:style>
    <style:style style:name="TableCell40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1" style:parent-style-name="Default" style:family="paragraph">
      <style:text-properties style:font-size-complex="12pt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3" style:parent-style-name="Default" style:family="paragraph">
      <style:text-properties style:font-size-complex="12pt"/>
    </style:style>
    <style:style style:name="TableCell40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5" style:parent-style-name="Default" style:family="paragraph">
      <style:text-properties style:font-size-complex="12pt"/>
    </style:style>
    <style:style style:name="TableCell40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7" style:parent-style-name="Default" style:family="paragraph">
      <style:text-properties style:font-size-complex="12pt"/>
    </style:style>
    <style:style style:name="TableCell408" style:family="table-cell">
      <style:table-cell-properties fo:border="0.0034in solid #000000" style:writing-mode="lr-tb" fo:padding-top="0in" fo:padding-left="0.075in" fo:padding-bottom="0in" fo:padding-right="0.075in"/>
    </style:style>
    <style:style style:name="P409" style:parent-style-name="Default" style:family="paragraph">
      <style:text-properties style:font-size-complex="12pt"/>
    </style:style>
    <style:style style:name="TableRow410" style:family="table-row">
      <style:table-row-properties style:min-row-height="0.0756in"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2" style:parent-style-name="Default" style:family="paragraph">
      <style:text-properties style:font-size-complex="12pt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4" style:parent-style-name="Default" style:family="paragraph">
      <style:text-properties style:font-size-complex="12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6" style:parent-style-name="Default" style:family="paragraph">
      <style:text-properties style:font-size-complex="12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8" style:parent-style-name="Default" style:family="paragraph">
      <style:text-properties style:font-size-complex="12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0" style:parent-style-name="Default" style:family="paragraph">
      <style:text-properties style:font-size-complex="12pt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22" style:parent-style-name="Default" style:family="paragraph">
      <style:text-properties style:font-size-complex="12pt"/>
    </style:style>
    <style:style style:name="TableRow423" style:family="table-row">
      <style:table-row-properties style:min-row-height="0.0756in"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5" style:parent-style-name="Default" style:family="paragraph">
      <style:text-properties style:font-size-complex="12pt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7" style:parent-style-name="Default" style:family="paragraph">
      <style:text-properties style:font-size-complex="12pt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9" style:parent-style-name="Default" style:family="paragraph">
      <style:text-properties style:font-size-complex="12pt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1" style:parent-style-name="Default" style:family="paragraph">
      <style:text-properties style:font-size-complex="12pt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3" style:parent-style-name="Default" style:family="paragraph">
      <style:text-properties style:font-size-complex="12pt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35" style:parent-style-name="Default" style:family="paragraph">
      <style:text-properties style:font-size-complex="12pt"/>
    </style:style>
    <style:style style:name="TableRow436" style:family="table-row">
      <style:table-row-properties style:min-row-height="0.0756in" style:use-optimal-row-height="false"/>
    </style:style>
    <style:style style:name="TableCell43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8" style:parent-style-name="Default" style:family="paragraph">
      <style:text-properties style:font-size-complex="12pt"/>
    </style:style>
    <style:style style:name="TableCell43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0" style:parent-style-name="Default" style:family="paragraph">
      <style:text-properties style:font-size-complex="12pt"/>
    </style:style>
    <style:style style:name="TableCell44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2" style:parent-style-name="Default" style:family="paragraph">
      <style:text-properties style:font-size-complex="12pt"/>
    </style:style>
    <style:style style:name="TableCell44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4" style:parent-style-name="Default" style:family="paragraph">
      <style:text-properties style:font-size-complex="12pt"/>
    </style:style>
    <style:style style:name="TableCell44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6" style:parent-style-name="Default" style:family="paragraph">
      <style:text-properties style:font-size-complex="12pt"/>
    </style:style>
    <style:style style:name="TableCell447" style:family="table-cell">
      <style:table-cell-properties fo:border="0.0034in solid #000000" style:writing-mode="lr-tb" fo:padding-top="0in" fo:padding-left="0.075in" fo:padding-bottom="0in" fo:padding-right="0.075in"/>
    </style:style>
    <style:style style:name="P448" style:parent-style-name="Default" style:family="paragraph">
      <style:text-properties style:font-size-complex="12pt"/>
    </style:style>
    <style:style style:name="TableRow449" style:family="table-row">
      <style:table-row-properties style:min-row-height="0.0756in"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1" style:parent-style-name="Default" style:family="paragraph">
      <style:text-properties style:font-size-complex="12pt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3" style:parent-style-name="Default" style:family="paragraph">
      <style:text-properties fo:font-size="10pt" style:font-size-asian="10pt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5" style:parent-style-name="Default" style:family="paragraph">
      <style:text-properties style:font-size-complex="12pt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7" style:parent-style-name="Default" style:family="paragraph">
      <style:text-properties style:font-size-complex="12pt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9" style:parent-style-name="Default" style:family="paragraph">
      <style:text-properties style:font-size-complex="12pt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61" style:parent-style-name="Default" style:family="paragraph">
      <style:text-properties style:font-size-complex="12pt"/>
    </style:style>
    <style:style style:name="TableRow462" style:family="table-row">
      <style:table-row-properties style:min-row-height="0.0756in"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4" style:parent-style-name="Default" style:family="paragraph">
      <style:text-properties style:font-size-complex="12pt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6" style:parent-style-name="Default" style:family="paragraph">
      <style:text-properties fo:font-size="10pt" style:font-size-asian="10pt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8" style:parent-style-name="Default" style:family="paragraph">
      <style:text-properties style:font-size-complex="12pt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0" style:parent-style-name="Default" style:family="paragraph">
      <style:text-properties style:font-size-complex="12pt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2" style:parent-style-name="Default" style:family="paragraph">
      <style:text-properties style:font-size-complex="12pt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74" style:parent-style-name="Default" style:family="paragraph">
      <style:text-properties style:font-size-complex="12pt"/>
    </style:style>
    <style:style style:name="TableRow475" style:family="table-row">
      <style:table-row-properties style:min-row-height="0.0756in"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7" style:parent-style-name="Default" style:family="paragraph">
      <style:text-properties style:font-size-complex="12pt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9" style:parent-style-name="Default" style:family="paragraph">
      <style:text-properties fo:font-size="10pt" style:font-size-asian="10pt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1" style:parent-style-name="Default" style:family="paragraph">
      <style:text-properties style:font-size-complex="12pt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3" style:parent-style-name="Default" style:family="paragraph">
      <style:text-properties style:font-size-complex="12pt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5" style:parent-style-name="Default" style:family="paragraph">
      <style:text-properties style:font-size-complex="12pt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87" style:parent-style-name="Default" style:family="paragraph">
      <style:text-properties style:font-size-complex="12pt"/>
    </style:style>
    <style:style style:name="T488" style:parent-style-name="Fonteparág.padrão" style:family="text">
      <style:text-properties style:font-size-complex="12pt"/>
    </style:style>
    <style:style style:name="P489" style:parent-style-name="Default" style:family="paragraph">
      <style:text-properties style:font-size-complex="12pt"/>
    </style:style>
    <style:style style:name="P490" style:parent-style-name="Default" style:family="paragraph">
      <style:text-properties style:font-size-complex="12pt"/>
    </style:style>
    <style:style style:name="T491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ME/DATA:_______________ HORA:__________ ESTOJO:___________LOTE:___________</text:p>
      <text:p text:style-name="P16"><text:s/></text:p>
      <text:p text:style-name="P17">CC/DATA:____________________ HORA:___________________ ESTOJO:__________________</text:p>
      <text:p text:style-name="P18"/>
      <text:p text:style-name="P19">NOME e CARIMBO dos FUNCIONÁRIOS da:<text:s/>CME:_______________________________________</text:p>
      <text:p text:style-name="P20"><text:s text:c="75"/></text:p>
      <text:p text:style-name="P21"><text:s text:c="76"/>C.C:________________________________________</text:p>
      <text:p text:style-name="P22"/>
      <text:p text:style-name="P23"><text:s text:c="76"/>Exp:________________________________________</text:p>
      <text:p text:style-name="P24"/>
      <text:p text:style-name="P25">AZUL SÓLIDO / MARROM LISTRADO BRANCO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NOME</text:p>
          </table:table-cell>
          <table:table-cell table:style-name="TableCell36">
            <text:p text:style-name="P37">INSTRUMENTAIS</text:p>
          </table:table-cell>
          <table:table-cell table:style-name="TableCell38">
            <text:p text:style-name="P39">Quant.</text:p>
          </table:table-cell>
          <table:table-cell table:style-name="TableCell40">
            <text:p text:style-name="P41">Cme</text:p>
          </table:table-cell>
          <table:table-cell table:style-name="TableCell42">
            <text:p text:style-name="P43">C.C</text:p>
          </table:table-cell>
          <table:table-cell table:style-name="TableCell44">
            <text:p text:style-name="P45">Exp.</text:p>
          </table:table-cell>
        </table:table-row>
        <table:table-row table:style-name="TableRow46">
          <table:table-cell table:style-name="TableCell47">
            <text:p text:style-name="P48">IM/A</text:p>
          </table:table-cell>
          <table:table-cell table:style-name="TableCell49">
            <text:p text:style-name="P50">Estojo Inox Perfurado 26 x 12 x 6 cm</text:p>
          </table:table-cell>
          <table:table-cell table:style-name="TableCell51">
            <text:p text:style-name="P52">1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IM/1-A</text:p>
          </table:table-cell>
          <table:table-cell table:style-name="TableCell62">
            <text:p text:style-name="P63">Pinça Pean<text:s/>Murf 150 mm</text:p>
          </table:table-cell>
          <table:table-cell table:style-name="TableCell64">
            <text:p text:style-name="P65">1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IM/2-A</text:p>
          </table:table-cell>
          <table:table-cell table:style-name="TableCell75">
            <text:p text:style-name="P76">Pinça Backaus 13 cm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IM/3-A</text:p>
          </table:table-cell>
          <table:table-cell table:style-name="TableCell88">
            <text:p text:style-name="P89">Pinça Backaus 13 cm</text:p>
          </table:table-cell>
          <table:table-cell table:style-name="TableCell90">
            <text:p text:style-name="P91">1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IM/4-A</text:p>
          </table:table-cell>
          <table:table-cell table:style-name="TableCell101">
            <text:p text:style-name="P102">Pinça Backaus 13 cm</text:p>
          </table:table-cell>
          <table:table-cell table:style-name="TableCell103">
            <text:p text:style-name="P104">1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IM/5-A</text:p>
          </table:table-cell>
          <table:table-cell table:style-name="TableCell114">
            <text:p text:style-name="P115">Pinça Backaus 13 cm</text:p>
          </table:table-cell>
          <table:table-cell table:style-name="TableCell116">
            <text:p text:style-name="P117">1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IM/6-A</text:p>
          </table:table-cell>
          <table:table-cell table:style-name="TableCell127">
            <text:p text:style-name="P128">Pinça Mosquito Reta 120 mm</text:p>
          </table:table-cell>
          <table:table-cell table:style-name="TableCell129">
            <text:p text:style-name="P130">1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IM/7-A</text:p>
          </table:table-cell>
          <table:table-cell table:style-name="TableCell140">
            <text:p text:style-name="P141">Pinça Mosquito Reta 120 mm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IM/8-A</text:p>
          </table:table-cell>
          <table:table-cell table:style-name="TableCell153">
            <text:p text:style-name="P154">Pinça<text:s/>Mosquito Reta 120 mm</text:p>
          </table:table-cell>
          <table:table-cell table:style-name="TableCell155">
            <text:p text:style-name="P156">1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IM/9-A</text:p>
          </table:table-cell>
          <table:table-cell table:style-name="TableCell166">
            <text:p text:style-name="P167">Pinça Mosquito Curva 120 mm</text:p>
          </table:table-cell>
          <table:table-cell table:style-name="TableCell168">
            <text:p text:style-name="P169">1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IM/10-A</text:p>
          </table:table-cell>
          <table:table-cell table:style-name="TableCell179">
            <text:p text:style-name="P180">Pinça Mosquito Curva 120 mm</text:p>
          </table:table-cell>
          <table:table-cell table:style-name="TableCell181">
            <text:p text:style-name="P182">1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IM/11-A</text:p>
          </table:table-cell>
          <table:table-cell table:style-name="TableCell192">
            <text:p text:style-name="P193">Pinça Mosquito Curva 120 mm</text:p>
          </table:table-cell>
          <table:table-cell table:style-name="TableCell194">
            <text:p text:style-name="P195">1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IM/12-A</text:p>
          </table:table-cell>
          <table:table-cell table:style-name="TableCell205">
            <text:p text:style-name="P206">Pinça Crille Curva 14 cm</text:p>
          </table:table-cell>
          <table:table-cell table:style-name="TableCell207">
            <text:p text:style-name="P208">1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IM/13-A</text:p>
          </table:table-cell>
          <table:table-cell table:style-name="TableCell218">
            <text:p text:style-name="P219">Pinça Crille Curva 14 cm</text:p>
          </table:table-cell>
          <table:table-cell table:style-name="TableCell220">
            <text:p text:style-name="P221">1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IM/14-A</text:p>
          </table:table-cell>
          <table:table-cell table:style-name="TableCell231">
            <text:p text:style-name="P232">Pinça Allis 15<text:s/>cm</text:p>
          </table:table-cell>
          <table:table-cell table:style-name="TableCell233">
            <text:p text:style-name="P234">1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IM/15-A</text:p>
          </table:table-cell>
          <table:table-cell table:style-name="TableCell244">
            <text:p text:style-name="P245">Pinça Allis 15 cm</text:p>
          </table:table-cell>
          <table:table-cell table:style-name="TableCell246">
            <text:p text:style-name="P247">1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IM/16-A</text:p>
          </table:table-cell>
          <table:table-cell table:style-name="TableCell257">
            <text:p text:style-name="P258">Pinça Dente de Rato 140 cm</text:p>
          </table:table-cell>
          <table:table-cell table:style-name="TableCell259">
            <text:p text:style-name="P260">1</text:p>
          </table:table-cell>
          <table:table-cell table:style-name="TableCell261">
            <text:p text:style-name="P262">,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IM/17-A</text:p>
          </table:table-cell>
          <table:table-cell table:style-name="TableCell270">
            <text:p text:style-name="P271">Pinça Anatômica 140 mm</text:p>
          </table:table-cell>
          <table:table-cell table:style-name="TableCell272">
            <text:p text:style-name="P273">1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IM/18-A</text:p>
          </table:table-cell>
          <table:table-cell table:style-name="TableCell283">
            <text:p text:style-name="P284">Pinça Adson Serrilha 120 mm</text:p>
          </table:table-cell>
          <table:table-cell table:style-name="TableCell285">
            <text:p text:style-name="P286">1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IM/19-A</text:p>
          </table:table-cell>
          <table:table-cell table:style-name="TableCell296">
            <text:p text:style-name="P297">Pinça Adson com dente 120 mm</text:p>
          </table:table-cell>
          <table:table-cell table:style-name="TableCell298">
            <text:p text:style-name="P299">1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IM/20-A</text:p>
          </table:table-cell>
          <table:table-cell table:style-name="TableCell309">
            <text:p text:style-name="P310">Afastador Farabeuf 12 x14.5</text:p>
          </table:table-cell>
          <table:table-cell table:style-name="TableCell311">
            <text:p text:style-name="P312">1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IM/21-A</text:p>
          </table:table-cell>
          <table:table-cell table:style-name="TableCell322">
            <text:p text:style-name="P323">Afastador Farabeuf 12 x14.5</text:p>
          </table:table-cell>
          <table:table-cell table:style-name="TableCell324">
            <text:p text:style-name="P325">1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IM/22-A</text:p>
          </table:table-cell>
          <table:table-cell table:style-name="TableCell335">
            <text:p text:style-name="P336">Tesoura Iris curva 120 mm</text:p>
          </table:table-cell>
          <table:table-cell table:style-name="TableCell337">
            <text:p text:style-name="P338">1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IM/23-A</text:p>
          </table:table-cell>
          <table:table-cell table:style-name="TableCell348">
            <text:p text:style-name="P349">Tesoura Iris reta 120 mm</text:p>
          </table:table-cell>
          <table:table-cell table:style-name="TableCell350">
            <text:p text:style-name="P351">1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IM/24-A</text:p>
          </table:table-cell>
          <table:table-cell table:style-name="TableCell361">
            <text:p text:style-name="P362">Tesoura Mayo curva 14 cm</text:p>
          </table:table-cell>
          <table:table-cell table:style-name="TableCell363">
            <text:p text:style-name="P364">1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IM/25-A</text:p>
          </table:table-cell>
          <table:table-cell table:style-name="TableCell374">
            <text:p text:style-name="P375">Tesoura Mayo reta 14 cm</text:p>
          </table:table-cell>
          <table:table-cell table:style-name="TableCell376">
            <text:p text:style-name="P377">1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IM/26-A</text:p>
          </table:table-cell>
          <table:table-cell table:style-name="TableCell387">
            <text:p text:style-name="P388">Porta Agulha Mayo Hegar 17 cm</text:p>
          </table:table-cell>
          <table:table-cell table:style-name="TableCell389">
            <text:p text:style-name="P390">1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IM/27-A</text:p>
          </table:table-cell>
          <table:table-cell table:style-name="TableCell400">
            <text:p text:style-name="P401">Porta Agulha Mayo Hegar 18 cm</text:p>
          </table:table-cell>
          <table:table-cell table:style-name="TableCell402">
            <text:p text:style-name="P403">1</text:p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IM/28-A</text:p>
          </table:table-cell>
          <table:table-cell table:style-name="TableCell413">
            <text:p text:style-name="P414">Cabo de Bisturi Nº4</text:p>
          </table:table-cell>
          <table:table-cell table:style-name="TableCell415">
            <text:p text:style-name="P416">1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IM/29-A</text:p>
          </table:table-cell>
          <table:table-cell table:style-name="TableCell426">
            <text:p text:style-name="P427">Descolador dupla ação freer 150 mm</text:p>
          </table:table-cell>
          <table:table-cell table:style-name="TableCell428">
            <text:p text:style-name="P429">1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IM/30-A</text:p>
          </table:table-cell>
          <table:table-cell table:style-name="TableCell439">
            <text:p text:style-name="P440">Afastador Sen-Miller Rombo</text:p>
          </table:table-cell>
          <table:table-cell table:style-name="TableCell441">
            <text:p text:style-name="P442">1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IM/31-A</text:p>
          </table:table-cell>
          <table:table-cell table:style-name="TableCell452">
            <text:p text:style-name="P453">Osteótemo (Rugina Farabeuf Curva)16 cm</text:p>
          </table:table-cell>
          <table:table-cell table:style-name="TableCell454">
            <text:p text:style-name="P455">1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IM/32-A</text:p>
          </table:table-cell>
          <table:table-cell table:style-name="TableCell465">
            <text:p text:style-name="P466">Afastador Rollet 4 e 3 garras<text:s/>delicadas 150 mm</text:p>
          </table:table-cell>
          <table:table-cell table:style-name="TableCell467">
            <text:p text:style-name="P468">1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IM/33-A</text:p>
          </table:table-cell>
          <table:table-cell table:style-name="TableCell478">
            <text:p text:style-name="P479">Têntacanula</text:p>
          </table:table-cell>
          <table:table-cell table:style-name="TableCell480">
            <text:p text:style-name="P481">1</text:p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</table:table>
      <text:p text:style-name="Default"/>
      <text:p text:style-name="Default"><text:s/><text:span text:style-name="T488">NOME e CARIMBO Enfermeira da CME:______________________________________</text:span></text:p>
      <text:p text:style-name="P489"/>
      <text:p text:style-name="P490"><text:s/>NOME e CARIMBO Enfermeira do C.C:_______________________________________</text:p>
      <text:p text:style-name="Standard"><text:s/></text:p>
      <text:p text:style-name="Standard"><text:span text:style-name="T491">COLAR ETIQUETA COM O NOME DO PACIENTE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libri" style:font-name-asian="Calibri" style:font-name-complex="Tahoma" fo:font-size="11pt" style:font-size-asian="11pt" style:font-size-complex="11pt" style:language-asian="en" style:country-asian="US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libri" style:font-name-asian="Calibri" style:font-name-complex="Tahoma"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Standard">
      <style:text-properties style:font-name="Tahoma" style:font-name-asian="Calibri" style:font-name-complex="Tahoma" fo:font-size="8pt" style:font-size-asian="8pt" style:font-size-complex="8pt" style:language-asian="en" style:country-asian="US" fo:hyphenate="false"/>
    </style:style>
    <style:style style:name="ParágrafodaLista" style:display-name="Parágrafo da Lista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>
      <style:text-properties style:font-name="Arial" style:font-name-asian="Arial" style:font-name-complex="Arial" fo:color="#000000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ebalãoChar" style:display-name="Texto de balão Char" style:family="text" style:parent-style-name="Fonteparág.padrão">
      <style:text-properties style:font-name="Tahoma" style:font-name-asian="Tahoma" style:font-name-complex="Tahoma" fo:font-size="8pt" style:font-size-asian="8pt" style:font-size-complex="8pt"/>
    </style:style>
    <style:style style:name="Númerodepágina" style:display-name="Número de página" style:family="text"/>
    <style:style style:name="CorpodetextoChar" style:display-name="Corpo de text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0pt" style:language-asian="pt" style:country-asian="B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text:list-style style:name="NoList" style:display-name="No List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5.2881in" text:min-label-width="0.25in" text:list-level-position-and-space-mode="label-alignment">
          <style:list-level-label-alignment text:label-followed-by="listtab" fo:margin-left="5.5381in" fo:text-indent="-0.25in"/>
        </style:list-level-properties>
      </text:list-level-style-bullet>
      <text:list-level-style-bullet text:level="2" text:style-name="WW_CharLFO4LVL2" text:bullet-char="o">
        <style:list-level-properties text:space-before="5.7881in" text:min-label-width="0.25in" text:list-level-position-and-space-mode="label-alignment">
          <style:list-level-label-alignment text:label-followed-by="listtab" fo:margin-left="6.038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6.2881in" text:min-label-width="0.25in" text:list-level-position-and-space-mode="label-alignment">
          <style:list-level-label-alignment text:label-followed-by="listtab" fo:margin-left="6.5381in" fo:text-indent="-0.25in"/>
        </style:list-level-properties>
      </text:list-level-style-bullet>
      <text:list-level-style-bullet text:level="4" text:bullet-char="">
        <style:list-level-properties text:space-before="6.7881in" text:min-label-width="0.25in" text:list-level-position-and-space-mode="label-alignment">
          <style:list-level-label-alignment text:label-followed-by="listtab" fo:margin-left="7.0381in" fo:text-indent="-0.25in"/>
        </style:list-level-properties>
      </text:list-level-style-bullet>
      <text:list-level-style-bullet text:level="5" text:style-name="WW_CharLFO4LVL5" text:bullet-char="o">
        <style:list-level-properties text:space-before="7.2881in" text:min-label-width="0.25in" text:list-level-position-and-space-mode="label-alignment">
          <style:list-level-label-alignment text:label-followed-by="listtab" fo:margin-left="7.5381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7.7881in" text:min-label-width="0.25in" text:list-level-position-and-space-mode="label-alignment">
          <style:list-level-label-alignment text:label-followed-by="listtab" fo:margin-left="8.0381in" fo:text-indent="-0.25in"/>
        </style:list-level-properties>
      </text:list-level-style-bullet>
      <text:list-level-style-bullet text:level="7" text:bullet-char="">
        <style:list-level-properties text:space-before="8.2881in" text:min-label-width="0.25in" text:list-level-position-and-space-mode="label-alignment">
          <style:list-level-label-alignment text:label-followed-by="listtab" fo:margin-left="8.5381in" fo:text-indent="-0.25in"/>
        </style:list-level-properties>
      </text:list-level-style-bullet>
      <text:list-level-style-bullet text:level="8" text:style-name="WW_CharLFO4LVL8" text:bullet-char="o">
        <style:list-level-properties text:space-before="8.7881in" text:min-label-width="0.25in" text:list-level-position-and-space-mode="label-alignment">
          <style:list-level-label-alignment text:label-followed-by="listtab" fo:margin-left="9.0381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9.2881in" text:min-label-width="0.25in" text:list-level-position-and-space-mode="label-alignment">
          <style:list-level-label-alignment text:label-followed-by="listtab" fo:margin-left="9.5381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2951in" fo:margin-left="0.7875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5909in"/>
      </style:footer-style>
    </style:page-layout>
    <style:style style:name="TableColumn3" style:family="table-column">
      <style:table-column-properties style:column-width="2.2277in" style:use-optimal-column-width="false"/>
    </style:style>
    <style:style style:name="TableColumn4" style:family="table-column">
      <style:table-column-properties style:column-width="2.8548in" style:use-optimal-column-width="false"/>
    </style:style>
    <style:style style:name="TableColumn5" style:family="table-column">
      <style:table-column-properties style:column-width="1.6687in" style:use-optimal-column-width="false"/>
    </style:style>
    <style:style style:name="Table2" style:family="table">
      <style:table-properties style:width="6.7513in" fo:margin-left="0.041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Default" style:family="paragraph">
      <style:paragraph-properties fo:text-align="center"/>
      <style:text-properties fo:font-weight="bold" style:font-weight-asian="bold" style:font-size-complex="12pt"/>
    </style:style>
    <style:style style:name="P10" style:parent-style-name="Default" style:family="paragraph">
      <style:paragraph-properties fo:text-align="center"/>
      <style:text-properties fo:font-weight="bold" style:font-weight-asian="bold" style:font-size-complex="12pt"/>
    </style:style>
    <style:style style:name="P11" style:parent-style-name="Default" style:family="paragraph">
      <style:paragraph-properties fo:text-align="center"/>
      <style:text-properties fo:font-weight="bold" style:font-weight-asian="bold" style:font-size-complex="12pt"/>
    </style:style>
    <style:style style:name="TableCell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text-align="end"/>
    </style:style>
    <style:style style:name="P14" style:parent-style-name="Cabeçalho" style:family="paragraph">
      <style:paragraph-properties fo:text-align="center"/>
    </style:style>
    <style:style style:name="P15" style:parent-style-name="Rodapé" style:family="paragraph">
      <style:paragraph-properties fo:text-align="end" fo:margin-right="-0.3944in">
        <style:tab-stops>
          <style:tab-stop style:type="center" style:position="2.9527in"/>
          <style:tab-stop style:type="right" style:position="6.3in"/>
        </style:tab-stops>
      </style:paragraph-properties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Standard"/>
            </table:table-cell>
            <table:table-cell table:style-name="TableCell8">
              <text:p text:style-name="P9">CHECKLIST</text:p>
              <text:p text:style-name="P10"><text:s/>ESTOJO CIRÚRGICO BÁSICO</text:p>
              <text:p text:style-name="P11">INSTRUMENTAL DE MÃOS</text:p>
            </table:table-cell>
            <table:table-cell table:style-name="TableCell12">
              <text:p text:style-name="P13"/>
            </table:table-cell>
          </table:table-row>
        </table:table>
        <text:p text:style-name="P14"/>
      </style:header>
      <style:footer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IMBRADO ((( M O D E L O )))</dc:title>
    <meta:initial-creator>C.H.S.</meta:initial-creator>
    <dc:creator>Camila Donato</dc:creator>
    <meta:creation-date>2025-09-01T14:00:00Z</meta:creation-date>
    <dc:date>2025-09-01T14:00:00Z</dc:date>
    <meta:print-date>2019-09-25T15:40:00Z</meta:print-date>
    <meta:template xlink:href="Normal" xlink:type="simple"/>
    <meta:editing-cycles>2</meta:editing-cycles>
    <meta:editing-duration>PT60S</meta:editing-duration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41" meta:character-count="2181" meta:row-count="15" meta:non-whitespace-character-count="1844"/>
  </office:meta>
</office:document-meta>
</file>